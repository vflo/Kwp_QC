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8f96" officeooo:paragraph-rsid="001a8f96" style:font-weight-asian="bold" style:font-weight-complex="bold"/>
    </style:style>
    <style:style style:name="P2" style:family="paragraph" style:parent-style-name="Standard">
      <style:text-properties officeooo:rsid="00136d43" officeooo:paragraph-rsid="00136d43"/>
    </style:style>
    <style:style style:name="P3" style:family="paragraph" style:parent-style-name="Standard">
      <style:text-properties officeooo:rsid="00178dae" officeooo:paragraph-rsid="001a8f96"/>
    </style:style>
    <style:style style:name="P4" style:family="paragraph" style:parent-style-name="Standard">
      <style:text-properties officeooo:rsid="001bffa5" officeooo:paragraph-rsid="001bffa5"/>
    </style:style>
    <style:style style:name="P5" style:family="paragraph" style:parent-style-name="Standard">
      <style:text-properties officeooo:rsid="001e520c" officeooo:paragraph-rsid="001e520c"/>
    </style:style>
    <style:style style:name="P6" style:family="paragraph" style:parent-style-name="Standard">
      <style:text-properties officeooo:rsid="00178dae" officeooo:paragraph-rsid="00178dae"/>
    </style:style>
    <style:style style:name="P7" style:family="paragraph" style:parent-style-name="Standard">
      <style:text-properties officeooo:rsid="001a8f96" officeooo:paragraph-rsid="001a8f96"/>
    </style:style>
    <style:style style:name="P8" style:family="paragraph" style:parent-style-name="Standard">
      <style:text-properties officeooo:paragraph-rsid="001a8f96"/>
    </style:style>
    <style:style style:name="P9" style:family="paragraph" style:parent-style-name="Standard">
      <style:text-properties officeooo:rsid="001e520c" officeooo:paragraph-rsid="0014a6c8"/>
    </style:style>
    <style:style style:name="P10" style:family="paragraph" style:parent-style-name="Standard">
      <style:text-properties officeooo:rsid="001fd3c5" officeooo:paragraph-rsid="001fd3c5"/>
    </style:style>
    <style:style style:name="T1" style:family="text">
      <style:text-properties officeooo:rsid="00145212"/>
    </style:style>
    <style:style style:name="T2" style:family="text">
      <style:text-properties officeooo:rsid="00178dae"/>
    </style:style>
    <style:style style:name="T3" style:family="text">
      <style:text-properties officeooo:rsid="00161849"/>
    </style:style>
    <style:style style:name="T4" style:family="text">
      <style:text-properties officeooo:rsid="001c56f4"/>
    </style:style>
    <style:style style:name="T5" style:family="text">
      <style:text-properties fo:font-weight="bold" officeooo:rsid="001a8f96" style:font-weight-asian="bold" style:font-weight-complex="bold"/>
    </style:style>
    <style:style style:name="T6" style:family="text">
      <style:text-properties officeooo:rsid="001a8f96"/>
    </style:style>
    <style:style style:name="T7" style:family="text">
      <style:text-properties officeooo:rsid="001bf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ulo</text:p>
      <text:p text:style-name="P2"/>
      <text:p text:style-name="P2">General comments:</text:p>
      <text:p text:style-name="P2">(1) The data template has been updated with two additional columns: leaf area (Column R, pl_LA) and the standard error of Kwp (Column AU, Standard_error_Kwp). Please extract or calculate these parameters based on the information provided in the original papers. If ‘LA’ is available, additional conversions between columns AW and BA may become possible. </text:p>
      <text:p text:style-name="P2">(<text:span text:style-name="T1">2</text:span>) Please recheck the information in the data document and ensure that all data are converted to the units specified on the ‘thesaurus’ sheet.</text:p>
      <text:p text:style-name="P2">(<text:span text:style-name="T1">3</text:span>) For any data points obtained through calculation, please provide the corresponding calculation formula in each cell, <text:span text:style-name="T1">whenever possible.</text:span></text:p>
      <text:p text:style-name="P2">(<text:span text:style-name="T1">4</text:span>) In the Observations column, if applicable, please indicate from which figure the data were extracted.</text:p>
      <text:p text:style-name="P2">(<text:span text:style-name="T2">5</text:span>) Based on plant/<text:span text:style-name="T2">stand</text:span> allometric data, please complete the calculation of Kwp_cor_XXX from columns. <text:span text:style-name="T2">Please check the Available Transformations table in the report. Also check the correctness of the transformations in the “Correct transformations” table in the report.</text:span></text:p>
      <text:p text:style-name="P2">(<text:span text:style-name="T2">6</text:span>) <text:span text:style-name="T2">Whenever possible,</text:span> <text:span text:style-name="T2">p</text:span><text:span text:style-name="T3">lease, report original WP and water flux.</text:span></text:p>
      <text:p text:style-name="P3">(7) Please double check Level values.</text:p>
      <text:p text:style-name="P4">(8) Check date column<text:span text:style-name="T4">s</text:span>. Set a valid format YYYYMMDD</text:p>
      <text:p text:style-name="P5">(9) Please fill in the P50, Pmin, TLP, Gsmax, Ks columns with yes/no</text:p>
      <text:p text:style-name="P6"/>
      <text:p text:style-name="P7">Specific comments:</text:p>
      <text:p text:style-name="P8"><text:span text:style-name="T5">1624_Teshera-Levye_2019:</text:span><text:span text:style-name="T6"> Please use the published paper instead of the thesis (I’m attaching it), also provide the DOI in the excel file. Also, units cm2 s-1 MPa-1 are weird!! I think they are wrong and the units should be cm3 s-1 MPa-1 as F is in cm3 s-1. Also please report Fig. 4a and Fig. 4b as “a” is based on Sap flow and mature trees (Level = plant; cm3 s-1 MPa-1) and “b” on seedlings and leaf level (Level = leaf; mmol m-2 s-1 MPa-1). </text:span><text:span text:style-name="T7">Check </text:span>pl_devstage.</text:p>
      <text:p text:style-name="P9"/>
      <text:p text:style-name="P10">1618_Tausend_2000: I’ve included Huber value, and changed pl_LA and pl_SA, please, double check. I’ve corrected the coordinates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ictor Flo</meta:initial-creator>
    <meta:creation-date>2025-07-18T13:52:36.171265456</meta:creation-date>
    <dc:date>2025-07-29T15:09:14.176780331</dc:date>
    <dc:creator>Victor Flo</dc:creator>
    <meta:editing-duration>PT59M</meta:editing-duration>
    <meta:editing-cycles>6</meta:editing-cycles>
    <meta:generator>LibreOffice/25.2.5.2$Linux_X86_64 LibreOffice_project/fb4792146257752f54eab576deb869869b108571</meta:generator>
    <meta:document-statistic meta:table-count="0" meta:image-count="0" meta:object-count="0" meta:page-count="1" meta:paragraph-count="14" meta:word-count="298" meta:character-count="1862" meta:non-whitespace-character-count="1577"/>
  </office:meta>
</office:document-meta>
</file>
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ptos" fo:font-size="12pt" fo:font-weight="bold" officeooo:rsid="002273e6" officeooo:paragraph-rsid="002273e6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ptos" fo:font-size="12pt" officeooo:rsid="00136d43" officeooo:paragraph-rsid="00136d43" style:font-size-asian="12pt" style:font-size-complex="12pt"/>
    </style:style>
    <style:style style:name="P3" style:family="paragraph" style:parent-style-name="Standard">
      <style:text-properties style:font-name="Aptos" fo:font-size="12pt" officeooo:rsid="00136d43" officeooo:paragraph-rsid="00291914" style:font-size-asian="12pt" style:font-size-complex="12pt"/>
    </style:style>
    <style:style style:name="P4" style:family="paragraph" style:parent-style-name="Standard">
      <style:text-properties style:font-name="Aptos" fo:font-size="12pt" officeooo:rsid="00178dae" officeooo:paragraph-rsid="001a8f96" style:font-size-asian="12pt" style:font-size-complex="12pt"/>
    </style:style>
    <style:style style:name="P5" style:family="paragraph" style:parent-style-name="Standard">
      <style:text-properties style:font-name="Aptos" fo:font-size="12pt" officeooo:rsid="001bffa5" officeooo:paragraph-rsid="001bffa5" style:font-size-asian="12pt" style:font-size-complex="12pt"/>
    </style:style>
    <style:style style:name="P6" style:family="paragraph" style:parent-style-name="Standard">
      <style:text-properties style:font-name="Aptos" fo:font-size="12pt" officeooo:rsid="001e520c" officeooo:paragraph-rsid="001e520c" style:font-size-asian="12pt" style:font-size-complex="12pt"/>
    </style:style>
    <style:style style:name="P7" style:family="paragraph" style:parent-style-name="Standard">
      <style:text-properties style:font-name="Aptos" fo:font-size="12pt" officeooo:rsid="00178dae" officeooo:paragraph-rsid="00178dae" style:font-size-asian="12pt" style:font-size-complex="12pt"/>
    </style:style>
    <style:style style:name="P8" style:family="paragraph" style:parent-style-name="Standard">
      <style:text-properties style:font-name="Aptos" fo:font-size="12pt" officeooo:rsid="001a8f96" officeooo:paragraph-rsid="001a8f96" style:font-size-asian="12pt" style:font-size-complex="12pt"/>
    </style:style>
    <style:style style:name="P9" style:family="paragraph" style:parent-style-name="Standard">
      <style:text-properties style:font-name="Aptos" fo:font-size="12pt" officeooo:rsid="002273e6" officeooo:paragraph-rsid="002273e6" style:font-size-asian="12pt" style:font-size-complex="12pt"/>
    </style:style>
    <style:style style:name="P10" style:family="paragraph" style:parent-style-name="Standard">
      <style:text-properties style:font-name="Aptos" fo:font-size="12pt" officeooo:paragraph-rsid="00243592" style:font-size-asian="12pt" style:font-size-complex="12pt"/>
    </style:style>
    <style:style style:name="P11" style:family="paragraph" style:parent-style-name="Standard">
      <style:text-properties style:font-name="Aptos" fo:font-size="12pt" officeooo:rsid="00258932" officeooo:paragraph-rsid="00258932" style:font-size-asian="12pt" style:font-size-complex="12pt"/>
    </style:style>
    <style:style style:name="P12" style:family="paragraph" style:parent-style-name="Standard">
      <style:text-properties officeooo:paragraph-rsid="00261c1a"/>
    </style:style>
    <style:style style:name="P13" style:family="paragraph" style:parent-style-name="Standard">
      <style:text-properties style:font-name="Aptos" fo:font-size="12pt" officeooo:rsid="0028e92d" officeooo:paragraph-rsid="0028e92d" style:font-size-asian="12pt" style:font-size-complex="12pt"/>
    </style:style>
    <style:style style:name="P14" style:family="paragraph" style:parent-style-name="Standard">
      <style:text-properties fo:color="#000000" loext:opacity="100%" style:text-outline="false" style:text-line-through-style="none" style:text-line-through-type="none" style:font-name="Aptos" fo:font-size="12pt" fo:font-style="normal" fo:text-shadow="none" style:text-underline-style="none" fo:font-weight="normal" officeooo:rsid="00258932" officeooo:paragraph-rsid="0028e92d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text-properties style:font-name="Aptos" fo:font-size="12pt" officeooo:rsid="002c8d64" officeooo:paragraph-rsid="002c8d64" style:font-size-asian="12pt" style:font-size-complex="12pt"/>
    </style:style>
    <style:style style:name="P16" style:family="paragraph" style:parent-style-name="Standard">
      <style:text-properties style:font-name="Aptos" fo:font-size="12pt" officeooo:rsid="002f3e84" officeooo:paragraph-rsid="002f3e84" style:font-size-asian="12pt" style:font-size-complex="12pt"/>
    </style:style>
    <style:style style:name="P17" style:family="paragraph" style:parent-style-name="Standard">
      <style:text-properties officeooo:rsid="00136d43" officeooo:paragraph-rsid="00136d43"/>
    </style:style>
    <style:style style:name="T1" style:family="text">
      <style:text-properties officeooo:rsid="00291914"/>
    </style:style>
    <style:style style:name="T2" style:family="text">
      <style:text-properties officeooo:rsid="00145212"/>
    </style:style>
    <style:style style:name="T3" style:family="text">
      <style:text-properties officeooo:rsid="00178dae"/>
    </style:style>
    <style:style style:name="T4" style:family="text">
      <style:text-properties officeooo:rsid="00161849"/>
    </style:style>
    <style:style style:name="T5" style:family="text">
      <style:text-properties officeooo:rsid="001c56f4"/>
    </style:style>
    <style:style style:name="T6" style:family="text">
      <style:text-properties officeooo:rsid="0028457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273e6" style:font-weight-asian="bold" style:font-weight-complex="bold"/>
    </style:style>
    <style:style style:name="T9" style:family="text">
      <style:text-properties officeooo:rsid="002273e6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273e6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43592" style:font-style-asian="normal" style:font-weight-asian="normal" style:text-emphasize="none"/>
    </style:style>
    <style:style style:name="T13" style:family="text">
      <style:text-properties style:font-name="Aptos" fo:font-size="12pt" fo:font-weight="bold" officeooo:rsid="002597bc" style:font-size-asian="12pt" style:font-weight-asian="bold" style:font-size-complex="12pt" style:font-weight-complex="bold"/>
    </style:style>
    <style:style style:name="T14" style:family="text">
      <style:text-properties style:font-name="Aptos" fo:font-size="12pt" officeooo:rsid="002597bc" style:font-size-asian="12pt" style:font-size-complex="12pt"/>
    </style:style>
    <style:style style:name="T15" style:family="text">
      <style:text-properties style:font-name="Aptos" fo:font-size="12pt" officeooo:rsid="00261c1a" style:font-size-asian="12pt" style:font-size-complex="12pt"/>
    </style:style>
    <style:style style:name="T16" style:family="text">
      <style:text-properties style:font-name="Aptos" fo:font-size="12pt" officeooo:rsid="0028168a" style:font-size-asian="12pt" style:font-size-complex="12pt"/>
    </style:style>
    <style:style style:name="T17" style:family="text">
      <style:text-properties style:font-name="Aptos" fo:font-size="12pt" style:font-size-asian="12pt" style:font-size-complex="12pt"/>
    </style:style>
    <style:style style:name="T18" style:family="text">
      <style:text-properties style:font-name="Aptos" fo:font-size="12pt" fo:font-weight="bold" officeooo:rsid="00261c1a" style:font-size-asian="12pt" style:font-weight-asian="bold" style:font-size-complex="12pt" style:font-weight-complex="bold"/>
    </style:style>
    <style:style style:name="T1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58932" style:font-style-asian="normal" style:font-weight-asian="normal" style:text-emphasize="none"/>
    </style:style>
    <style:style style:name="T20" style:family="text">
      <style:text-properties officeooo:rsid="002a3269"/>
    </style:style>
    <style:style style:name="T21" style:family="text">
      <style:text-properties officeooo:rsid="002b686b"/>
    </style:style>
    <style:style style:name="T22" style:family="text">
      <style:text-properties officeooo:rsid="002f3e84"/>
    </style:style>
    <style:style style:name="T23" style:family="text">
      <style:text-properties officeooo:rsid="002c8d64"/>
    </style:style>
    <style:style style:name="T24" style:family="text">
      <style:text-properties officeooo:rsid="002e6025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a3269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le</text:p>
      <text:p text:style-name="P2"/>
      <text:p text:style-name="P2">General comments:</text:p>
      <text:p text:style-name="P3">(1) The data template has been updated with two additional columns: leaf area ( pl_LA), <text:span text:style-name="T1">stand basal area (st_basal_area),</text:span> and the standard error of Kwp (Standard_error_Kwp). Please extract or calculate these <text:span text:style-name="T1">values</text:span> based on the information provided in the original papers. If <text:span text:style-name="T1">pl_</text:span>LA <text:span text:style-name="T1">or st_basal_area are</text:span> available,<text:span text:style-name="T1"> </text:span>additional conversions <text:span text:style-name="T1">in Kwp_cor_*** might be possible.</text:span></text:p>
      <text:p text:style-name="P2">(<text:span text:style-name="T2">2</text:span>) Please recheck the information in the data document and ensure that all data are converted to the units specified on the ‘thesaurus’ sheet.</text:p>
      <text:p text:style-name="P2">(<text:span text:style-name="T2">3</text:span>) For any data points obtained through calculation, please provide the corresponding calculation formula in each cell, <text:span text:style-name="T2">whenever possible.</text:span></text:p>
      <text:p text:style-name="P2">(<text:span text:style-name="T2">4</text:span>) In the Observations column, if applicable, please indicate from which figure the data were extracted.</text:p>
      <text:p text:style-name="P2">(<text:span text:style-name="T3">5</text:span>) Based on plant/<text:span text:style-name="T3">stand</text:span> allometric data, please complete the calculation of Kwp_cor_XXX from columns. <text:span text:style-name="T3">Please check the Available Transformations table in the report. Also check the correctness of the transformations in the “Correct transformations” table in the report.</text:span></text:p>
      <text:p text:style-name="P2">(<text:span text:style-name="T3">6</text:span>) <text:span text:style-name="T3">Whenever possible,</text:span> <text:span text:style-name="T3">p</text:span><text:span text:style-name="T4">lease, report original WP and water flux.</text:span></text:p>
      <text:p text:style-name="P4">(7) Please double check Level values.</text:p>
      <text:p text:style-name="P5">(8) Check date column<text:span text:style-name="T5">s</text:span>. Set a valid format YYYYMMDD <text:span text:style-name="T6">or YYYYMMDD-YYYYMMDD</text:span></text:p>
      <text:p text:style-name="P6">(9) Please fill in the P50, Pmin, TLP, Gsmax, Ks columns with yes/no</text:p>
      <text:p text:style-name="P7"/>
      <text:p text:style-name="P8">Specific comments:</text:p>
      <text:p text:style-name="P9"><text:span text:style-name="T7">423_Domec_2010</text:span>: I’ve corrected CO2 column values. I’ve corrected HV. I’ve corrected the Level value and all the transformations. <text:s/>I’ve corrected Kwp original units. Added elevation.</text:p>
      <text:p text:style-name="P9"><text:span text:style-name="T7">484_Ewers_2000:</text:span> I’ve corrected the Level value and all the transformations. I’ve corrected the Hv. Also corrected date column.</text:p>
      <text:p text:style-name="P10"><text:span text:style-name="T8">731_Irvine_1998:</text:span><text:span text:style-name="T9"> please provide gs using units transformed to </text:span><text:span text:style-name="T10">mol.m-2.s-1. </text:span><text:span text:style-name="T11"><text:s/>I’ve corrected all the transformations. <text:s/>I’ve corrected Kwp original units. </text:span><text:span text:style-name="T12">I’ve corrected longitude value to allow in-land check</text:span></text:p>
      <text:p text:style-name="P11"><text:span text:style-name="T7">784_Kavanagh_2007: </text:span><text:s/><text:span text:style-name="T9">please provide gs using units transformed to </text:span><text:span text:style-name="T10">mol.m-2.s-1. </text:span><text:span text:style-name="T10">P</text:span><text:span text:style-name="T10">l</text:span><text:span text:style-name="T10">e</text:span><text:span text:style-name="T10">a</text:span><text:span text:style-name="T10">s</text:span><text:span text:style-name="T10">e, </text:span><text:span text:style-name="T10">p</text:span><text:span text:style-name="T10">r</text:span><text:span text:style-name="T10">o</text:span><text:span text:style-name="T10">v</text:span><text:span text:style-name="T10">i</text:span><text:span text:style-name="T10">d</text:span><text:span text:style-name="T10">e </text:span><text:span text:style-name="T10">p</text:span><text:span text:style-name="T10">l</text:span><text:span text:style-name="T10">_</text:span><text:span text:style-name="T10">S</text:span><text:span text:style-name="T10">A </text:span><text:span text:style-name="T10">i</text:span><text:span text:style-name="T10">n </text:span><text:span text:style-name="T10">u</text:span><text:span text:style-name="T10">n</text:span><text:span text:style-name="T10">i</text:span><text:span text:style-name="T10">t</text:span><text:span text:style-name="T10">s </text:span><text:span text:style-name="T10">o</text:span><text:span text:style-name="T10">f </text:span><text:span text:style-name="T10">m</text:span><text:span text:style-name="T10">2. </text:span><text:span text:style-name="T10">P</text:span><text:span text:style-name="T10">l</text:span><text:span text:style-name="T10">e</text:span><text:span text:style-name="T10">a</text:span><text:span text:style-name="T10">s</text:span><text:span text:style-name="T10">e, </text:span><text:span text:style-name="T10">c</text:span><text:span text:style-name="T10">h</text:span><text:span text:style-name="T10">e</text:span><text:span text:style-name="T10">c</text:span><text:span text:style-name="T10">k </text:span><text:span text:style-name="T10">o</text:span><text:span text:style-name="T10">t</text:span><text:span text:style-name="T10">h</text:span><text:span text:style-name="T10">e</text:span><text:span text:style-name="T10">r </text:span><text:span text:style-name="T10">u</text:span><text:span text:style-name="T10">n</text:span><text:span text:style-name="T10">i</text:span><text:span text:style-name="T10">t</text:span><text:span text:style-name="T10">s </text:span><text:span text:style-name="T10">i</text:span><text:span text:style-name="T10">n </text:span><text:span text:style-name="T10">t</text:span><text:span text:style-name="T10">h</text:span><text:span text:style-name="T10">e </text:span><text:span text:style-name="T10">T</text:span><text:span text:style-name="T10">h</text:span><text:span text:style-name="T10">e</text:span><text:span text:style-name="T10">s</text:span><text:span text:style-name="T10">a</text:span><text:span text:style-name="T10">u</text:span><text:span text:style-name="T10">r</text:span><text:span text:style-name="T10">u</text:span><text:span text:style-name="T10">s. </text:span><text:span text:style-name="T10">P</text:span><text:span text:style-name="T10">l</text:span><text:span text:style-name="T10">e</text:span><text:span text:style-name="T10">as</text:span><text:span text:style-name="T10">e, </text:span><text:span text:style-name="T10">p</text:span><text:span text:style-name="T10">r</text:span><text:span text:style-name="T10">o</text:span><text:span text:style-name="T10">v</text:span><text:span text:style-name="T10">i</text:span><text:span text:style-name="T10">d</text:span><text:span text:style-name="T10">e </text:span><text:span text:style-name="T10">a </text:span><text:span text:style-name="T10">u</text:span><text:span text:style-name="T10">n</text:span><text:span text:style-name="T10">i</text:span><text:span text:style-name="T10">q</text:span><text:span text:style-name="T10">u</text:span><text:span text:style-name="T10">e, </text:span><text:span text:style-name="T10">n</text:span><text:span text:style-name="T10">o</text:span><text:span text:style-name="T10">t </text:span><text:span text:style-name="T10">a </text:span><text:span text:style-name="T10">r</text:span><text:span text:style-name="T10">a</text:span><text:span text:style-name="T10">n</text:span><text:span text:style-name="T10">g</text:span><text:span text:style-name="T10">e. </text:span><text:span text:style-name="T10">P</text:span><text:span text:style-name="T10">l</text:span><text:span text:style-name="T10">e</text:span><text:span text:style-name="T10">a</text:span><text:span text:style-name="T10">s</text:span><text:span text:style-name="T10">e, </text:span><text:span text:style-name="T10">p</text:span><text:span text:style-name="T10">r</text:span><text:span text:style-name="T10">o</text:span><text:span text:style-name="T10">v</text:span><text:span text:style-name="T10">i</text:span><text:span text:style-name="T10">d</text:span><text:span text:style-name="T10">e </text:span><text:span text:style-name="T10">a </text:span><text:span text:style-name="T10">u</text:span><text:span text:style-name="T10">n</text:span><text:span text:style-name="T10">i</text:span><text:span text:style-name="T10">q</text:span><text:span text:style-name="T10">u</text:span><text:span text:style-name="T10">e </text:span><text:span text:style-name="T10">p</text:span><text:span text:style-name="T10">l</text:span><text:span text:style-name="T10">_</text:span><text:span text:style-name="T10">a</text:span><text:span text:style-name="T10">g</text:span><text:span text:style-name="T10">e, </text:span><text:span text:style-name="T10">n</text:span><text:span text:style-name="T10">o</text:span><text:span text:style-name="T10">t </text:span><text:span text:style-name="T10">a </text:span><text:span text:style-name="T10">r</text:span><text:span text:style-name="T10">a</text:span><text:span text:style-name="T10">n</text:span><text:span text:style-name="T10">g</text:span><text:span text:style-name="T10">e. </text:span><text:span text:style-name="T10">I’</text:span><text:span text:style-name="T10">v</text:span><text:span text:style-name="T10">e </text:span><text:span text:style-name="T10">m</text:span><text:span text:style-name="T10">o</text:span><text:span text:style-name="T10">d</text:span><text:span text:style-name="T10">i</text:span><text:span text:style-name="T10">f</text:span><text:span text:style-name="T10">i</text:span><text:span text:style-name="T10">e</text:span><text:span text:style-name="T10">d </text:span><text:span text:style-name="T10">t</text:span><text:span text:style-name="T10">h</text:span><text:span text:style-name="T10">e </text:span><text:span text:style-name="T10">D</text:span><text:span text:style-name="T10">a</text:span><text:span text:style-name="T10">t</text:span><text:span text:style-name="T10">e. </text:span><text:span text:style-name="T10">I’</text:span><text:span text:style-name="T10">v</text:span><text:span text:style-name="T10">e </text:span><text:span text:style-name="T10">s</text:span><text:span text:style-name="T10">e</text:span><text:span text:style-name="T10">t </text:span><text:span text:style-name="T10">L</text:span><text:span text:style-name="T10">e</text:span><text:span text:style-name="T10">v</text:span><text:span text:style-name="T10">e</text:span><text:span text:style-name="T10">l </text:span><text:span text:style-name="T10">= </text:span><text:span text:style-name="T10">L</text:span><text:span text:style-name="T10">e</text:span><text:span text:style-name="T10">a</text:span><text:span text:style-name="T10">f, </text:span><text:span text:style-name="T10">c</text:span><text:span text:style-name="T10">o</text:span><text:span text:style-name="T10">r</text:span><text:span text:style-name="T10">r</text:span><text:span text:style-name="T10">e</text:span><text:span text:style-name="T10">c</text:span><text:span text:style-name="T10">t</text:span><text:span text:style-name="T10">e</text:span><text:span text:style-name="T10">d </text:span><text:span text:style-name="T10">u</text:span><text:span text:style-name="T10">n</text:span><text:span text:style-name="T10">i</text:span><text:span text:style-name="T10">t</text:span><text:span text:style-name="T10">s, </text:span><text:span text:style-name="T10">a</text:span><text:span text:style-name="T10">n</text:span><text:span text:style-name="T10">d </text:span><text:span text:style-name="T10">c</text:span><text:span text:style-name="T10">a</text:span><text:span text:style-name="T10">l</text:span><text:span text:style-name="T10">c</text:span><text:span text:style-name="T10">u</text:span><text:span text:style-name="T10">l</text:span><text:span text:style-name="T10">a</text:span><text:span text:style-name="T10">t</text:span><text:span text:style-name="T10">e</text:span><text:span text:style-name="T10">d </text:span><text:span text:style-name="T10">t</text:span><text:span text:style-name="T10">h</text:span><text:span text:style-name="T10">e </text:span><text:span text:style-name="T10">K</text:span><text:span text:style-name="T10">w</text:span><text:span text:style-name="T10">p</text:span><text:span text:style-name="T10">_</text:span><text:span text:style-name="T10">c</text:span><text:span text:style-name="T10">o</text:span><text:span text:style-name="T10">r</text:span><text:span text:style-name="T10">_</text:span><text:span text:style-name="T10">l</text:span><text:span text:style-name="T10">e</text:span><text:span text:style-name="T10">a</text:span><text:span text:style-name="T10">f.</text:span></text:p>
      <text:p text:style-name="P12"><text:span text:style-name="T13">813_Kolb_2000:</text:span><text:span text:style-name="T14"> I’ve removed water potential <text:s/></text:span><text:span text:style-name="T15">and gs </text:span><text:span text:style-name="T14">comments. </text:span><text:span text:style-name="T16">I’ve set Level to Leaf.</text:span><text:span text:style-name="T14"> </text:span><text:span text:style-name="T17">The original units that the authors report for KL appear to be incorrect. All the conductances (Gw) are on the order of ~50 mmol m⁻² s⁻¹. When transforming these to transpiration rates, if we assume VPD = 1 kPa for example, then E = 50 mmol m⁻² s⁻¹ × 1 kPa/101.3 kPa = 0.49 mmol m⁻² s⁻¹. Therefore, if KL = E/ΔΨ and Ψ ~ 1 MPa, it would be impossible for KL to be ~1.5 </text:span><text:span text:style-name="Strong_20_Emphasis"><text:span text:style-name="T17">mol</text:span></text:span><text:span text:style-name="T17"> m⁻² s⁻¹ MPa⁻¹. </text:span><text:span text:style-name="T15">Another prove of that, is that Kwp_cor_Leaf usually have values of the 10^-5 order. </text:span><text:span text:style-name="T17">What do you think? </text:span><text:span text:style-name="T15">I’m changing the “Kwp_original_units” to </text:span><text:span text:style-name="T18">mmol</text:span><text:span text:style-name="T15"> m-2 s-1 MPa-1.</text:span></text:p>
      <text:p text:style-name="P13"><text:span text:style-name="T7">890_Limousin_2013</text:span>: Please, set an average CO2 level instead of a range. <text:span text:style-name="T19">I’ve set Level = Leaf, corrected units, and calculated the Kwp_cor_leaf.</text:span></text:p>
      <text:p text:style-name="P14"><text:span text:style-name="T7">938_Loustau_1996:</text:span> <text:span text:style-name="T20">si_long corrected. Plant species is missing. Kwp_cor_sapwood transformation corrected. </text:span><text:span text:style-name="T21">All Kwp_cor_*** <text:s/>transformations done. Change pl_basal_area to st_basal_area, I’m assuming units in the original paper are wrong and should be m2 ha-1? Please, check. Level changed to Sapw</text:span><text:span text:style-name="T22">o</text:span><text:span text:style-name="T21">od. </text:span><text:span text:style-name="T23">Please, check all the changes.</text:span></text:p>
      <text:p text:style-name="P15"><text:span text:style-name="T7">974_Maherali_2001:</text:span> Please, check Date column format. Set st_density average value, not a range. Please, check Level and “Kwp_original_units”. You have extracted the values from Fig. <text:soft-page-break/>5, don’t you? <text:span text:style-name="T24">I’ve deleted the first 4 rows as they where based on daily values. Values in Kwp_cor_Leaf are from Fig. 5 too? Please, check pl_LAI units or values.</text:span></text:p>
      <text:p text:style-name="P16"><text:span text:style-name="T7">1202_Noormets_2010:</text:span> si_lat and <text:span text:style-name="T25">si_long corrected. </text:span><text:span text:style-name="T10">Corrected units and Level set to Leaf.</text:span>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ictor Flo</meta:initial-creator>
    <meta:creation-date>2025-07-18T13:52:36.171265456</meta:creation-date>
    <dc:date>2025-08-04T08:39:14.149112735</dc:date>
    <dc:creator>Victor Flo</dc:creator>
    <meta:editing-duration>PT4H47M38S</meta:editing-duration>
    <meta:editing-cycles>16</meta:editing-cycles>
    <meta:generator>LibreOffice/25.2.5.2$Linux_X86_64 LibreOffice_project/fb4792146257752f54eab576deb869869b108571</meta:generator>
    <meta:document-statistic meta:table-count="0" meta:image-count="0" meta:object-count="0" meta:page-count="2" meta:paragraph-count="21" meta:word-count="583" meta:character-count="3705" meta:non-whitespace-character-count="3149"/>
  </office:meta>
</office:document-meta>
</file>
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1849" officeooo:paragraph-rsid="00161849" style:font-weight-asian="bold" style:font-weight-complex="bold"/>
    </style:style>
    <style:style style:name="P2" style:family="paragraph" style:parent-style-name="Standard">
      <style:text-properties officeooo:rsid="00136d43" officeooo:paragraph-rsid="00136d43"/>
    </style:style>
    <style:style style:name="P3" style:family="paragraph" style:parent-style-name="Standard">
      <style:text-properties officeooo:rsid="00178dae" officeooo:paragraph-rsid="00178dae"/>
    </style:style>
    <style:style style:name="P4" style:family="paragraph" style:parent-style-name="Standard">
      <style:text-properties officeooo:rsid="0014a6c8" officeooo:paragraph-rsid="0014a6c8"/>
    </style:style>
    <style:style style:name="T1" style:family="text">
      <style:text-properties officeooo:rsid="00145212"/>
    </style:style>
    <style:style style:name="T2" style:family="text">
      <style:text-properties officeooo:rsid="00178dae"/>
    </style:style>
    <style:style style:name="T3" style:family="text">
      <style:text-properties officeooo:rsid="001618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fa</text:p>
      <text:p text:style-name="P2"/>
      <text:p text:style-name="P2">General comments:</text:p>
      <text:p text:style-name="P2">(1) The data template has been updated with two additional columns: leaf area (Column R, pl_LA) and the standard error of Kwp (Column AU, Standard_error_Kwp). Please extract or calculate these parameters based on the information provided in the original papers. If ‘LA’ is available, additional conversions between columns AW and BA may become possible. </text:p>
      <text:p text:style-name="P2">(<text:span text:style-name="T1">2</text:span>) Please recheck the information in the data document and ensure that all data are converted to the units specified on the ‘thesaurus’ sheet.</text:p>
      <text:p text:style-name="P2">(<text:span text:style-name="T1">3</text:span>) For any data points obtained through calculation, please provide the corresponding calculation formula in each cell, <text:span text:style-name="T1">whenever possible.</text:span></text:p>
      <text:p text:style-name="P2">(<text:span text:style-name="T1">4</text:span>) In the Observations column, if applicable, please indicate from which figure the data were extracted.</text:p>
      <text:p text:style-name="P2">(<text:span text:style-name="T2">5</text:span>) Based on plant/<text:span text:style-name="T2">stand</text:span> allometric data, please complete the calculation of Kwp_cor_XXX from columns. <text:span text:style-name="T2">Please check the Available Transformations table in the report. Also check the correctness of the transformations in the “Correct transformations” table in the report.</text:span></text:p>
      <text:p text:style-name="P2">(<text:span text:style-name="T2">6</text:span>) <text:span text:style-name="T2">Whenever possible,</text:span> <text:span text:style-name="T2">p</text:span><text:span text:style-name="T3">lease, report original WP and water flux.</text:span></text:p>
      <text:p text:style-name="P3">(7) To run the report I had to fill in values in the Kwp and original units columns (values in red in the excel file). I also changed some Level values. Please double check.</text:p>
      <text:p text:style-name="P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ictor Flo</meta:initial-creator>
    <meta:creation-date>2025-07-18T13:52:36.171265456</meta:creation-date>
    <dc:date>2025-07-24T16:38:38.261323373</dc:date>
    <dc:creator>Victor Flo</dc:creator>
    <meta:editing-duration>PT22M48S</meta:editing-duration>
    <meta:editing-cycles>2</meta:editing-cycles>
    <meta:generator>LibreOffice/25.2.5.2$Linux_X86_64 LibreOffice_project/fb4792146257752f54eab576deb869869b108571</meta:generator>
    <meta:document-statistic meta:table-count="0" meta:image-count="0" meta:object-count="0" meta:page-count="1" meta:paragraph-count="9" meta:word-count="198" meta:character-count="1270" meta:non-whitespace-character-count="1080"/>
  </office:meta>
</office:document-meta>
</file>